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JetBrains Mono Medium" svg:font-family="'JetBrains Mono Medium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9in"/>
    </style:style>
    <style:style style:name="co2" style:family="table-column">
      <style:table-column-properties fo:break-before="auto" style:column-width="4.4457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ce3" style:family="table-cell" style:parent-style-name="Default">
      <style:text-properties fo:color="#067d17" style:font-name="JetBrains Mono Medium" fo:font-size="9pt" fo:language="none" fo:country="none" style:font-name-asian="JetBrains Mono Medium" style:font-size-asian="9pt" style:language-asian="none" style:country-asian="none" style:font-name-complex="JetBrains Mono Medium" style:font-size-complex="9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tCall</text:p>
          </table:table-cell>
          <table:table-cell table:formula="of:=ORG.LIBREOFFICE.REST.LIBREOFFICEREST.HTTPGET(&quot;https://api.kraken.com/0/public/Ticker?pair=XBTEUR&quot;)" office:value-type="string" office:string-value="{&quot;error&quot;:[],&quot;result&quot;:{&quot;XXBTZEUR&quot;:{&quot;a&quot;:[&quot;69098.10000&quot;,&quot;1&quot;,&quot;1.000&quot;],&quot;b&quot;:[&quot;69098.00000&quot;,&quot;1&quot;,&quot;1.000&quot;],&quot;c&quot;:[&quot;69098.10000&quot;,&quot;0.00265230&quot;],&quot;v&quot;:[&quot;38.91844474&quot;,&quot;290.99838908&quot;],&quot;p&quot;:[&quot;69065.31543&quot;,&quot;68745.84525&quot;],&quot;t&quot;:[2768,20823],&quot;l&quot;:[&quot;68526.30000&quot;,&quot;68065.40000&quot;],&quot;h&quot;:[&quot;69250.00000&quot;,&quot;69250.00000&quot;],&quot;o&quot;:&quot;68597.10000&quot;}}}" calcext:value-type="string">
            <text:p>{"error":[],"result":{"XXBTZEUR":{"a":["69098.10000","1","1.000"],"b":["69098.00000","1","1.000"],"c":["69098.10000","0.00265230"],"v":["38.91844474","290.99838908"],"p":["69065.31543","68745.84525"],"t":[2768,20823],"l":["68526.30000","68065.40000"],"h":["69250.00000","69250.00000"],"o":"68597.10000"}}}</text:p>
          </table:table-cell>
          <table:table-cell/>
        </table:table-row>
        <table:table-row table:style-name="ro1">
          <table:table-cell office:value-type="string" calcext:value-type="string">
            <text:p>JSON Parsing Stock/Crypto Price</text:p>
          </table:table-cell>
          <table:table-cell table:formula="of:=ORG.LIBREOFFICE.REST.LIBREOFFICEREST.JSONNUMBER([.B3];&quot;$.result.XXBTZEUR.c[0]&quot;)" office:value-type="float" office:value="69098.1" calcext:value-type="float">
            <text:p>69098.1</text:p>
          </table:table-cell>
          <table:table-cell/>
        </table:table-row>
        <table:table-row table:style-name="ro1">
          <table:table-cell office:value-type="string" calcext:value-type="string">
            <text:p>AddIn Ping</text:p>
          </table:table-cell>
          <table:table-cell table:formula="of:=ORG.LIBREOFFICE.REST.LIBREOFFICEREST.PING()" office:value-type="string" office:string-value="LibreOfficeRest OK" calcext:value-type="string">
            <text:p>LibreOfficeRest OK</text:p>
          </table:table-cell>
          <table:table-cell/>
        </table:table-row>
        <table:table-row table:style-name="ro1">
          <table:table-cell office:value-type="string" calcext:value-type="string">
            <text:p>Good JSON Test</text:p>
          </table:table-cell>
          <table:table-cell table:style-name="ce1" table:formula="of:=ORG.LIBREOFFICE.REST.LIBREOFFICEREST.JSONVALID([.B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d JSON Test</text:p>
          </table:table-cell>
          <table:table-cell table:style-name="ce1" table:formula="of:=ORG.LIBREOFFICE.REST.LIBREOFFICEREST.JSONVALID(&quot;asd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JetBrains Mono Medium" svg:font-family="'JetBrains Mono Medium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 style:data-style-name="N2" text:time-value="05:33:39.8886494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20:54:14.797421012</meta:creation-date>
    <dc:date>2026-05-13T05:50:30.341739591</dc:date>
    <meta:editing-duration>PT8H33M29S</meta:editing-duration>
    <meta:editing-cycles>15</meta:editing-cycles>
    <meta:generator>LibreOffice/26.2.3.2$Linux_X86_64 LibreOffice_project/70e089b17412e4cb7773e41413306b17a2328c34</meta:generator>
    <meta:document-statistic meta:table-count="1" meta:cell-count="11" meta:object-count="0"/>
  </office:meta>
</office:document-meta>
</file>