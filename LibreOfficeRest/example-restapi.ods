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9in"/>
    </style:style>
    <style:style style:name="co2" style:family="table-column">
      <style:table-column-properties fo:break-before="auto" style:column-width="5.1571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98in" fo:break-before="auto" style:use-optimal-row-height="false"/>
    </style:style>
    <style:style style:name="ro3" style:family="table-row">
      <style:table-row-properties style:row-height="0.8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erif" style:font-name-asian="DejaVu Sans" style:font-name-complex="DejaVu Sans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/>
        <table:table-column table:style-name="co4" table:number-columns-repeated="16381"/>
        <table:table-row table:style-name="ro1">
          <table:table-cell office:value-type="string" calcext:value-type="string">
            <text:p>Examples</text:p>
          </table:table-cell>
          <table:table-cell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RestCall Response</text:p>
          </table:table-cell>
          <table:table-cell table:style-name="ce1" table:formula="of:=ORG.LIBREOFFICE.REST.LIBREOFFICEREST.HTTPGET(&quot;https://api.kraken.com/0/public/Ticker?pair=XBTEUR&quot;)" office:value-type="string" office:string-value="{&quot;error&quot;:[],&quot;result&quot;:{&quot;XXBTZEUR&quot;:{&quot;a&quot;:[&quot;67149.20000&quot;,&quot;1&quot;,&quot;1.000&quot;],&quot;b&quot;:[&quot;67144.40000&quot;,&quot;1&quot;,&quot;1.000&quot;],&quot;c&quot;:[&quot;67151.20000&quot;,&quot;0.00611894&quot;],&quot;v&quot;:[&quot;57.22465619&quot;,&quot;91.27682637&quot;],&quot;p&quot;:[&quot;67256.28518&quot;,&quot;67298.25806&quot;],&quot;t&quot;:[10408,16760],&quot;l&quot;:[&quot;66900.00000&quot;,&quot;66900.00000&quot;],&quot;h&quot;:[&quot;67624.50000&quot;,&quot;67624.50000&quot;],&quot;o&quot;:&quot;67268.30000&quot;}}}" calcext:value-type="string">
            <text:p>{"error":[],"result":{"XXBTZEUR":{"a":["67149.20000","1","1.000"],"b":["67144.40000","1","1.000"],"c":["67151.20000","0.00611894"],"v":["57.22465619","91.27682637"],"p":["67256.28518","67298.25806"],"t":[10408,16760],"l":["66900.00000","66900.00000"],"h":["67624.50000","67624.50000"],"o":"67268.30000"}}}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JSON Parsing Stock/Crypto Price</text:p>
          </table:table-cell>
          <table:table-cell table:formula="of:=ORG.LIBREOFFICE.REST.LIBREOFFICEREST.JSONNUMBER([.B3];&quot;$.result.XXBTZEUR.c[0]&quot;)" office:value-type="float" office:value="67151.2" calcext:value-type="float">
            <text:p>67151.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ddIn Ping</text:p>
          </table:table-cell>
          <table:table-cell table:formula="of:=ORG.LIBREOFFICE.REST.LIBREOFFICEREST.PING()" office:value-type="string" office:string-value="LibreOfficeRest OK" calcext:value-type="string">
            <text:p>LibreOfficeRest OK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Good JSON Test</text:p>
          </table:table-cell>
          <table:table-cell table:style-name="ce6" table:formula="of:=ORG.LIBREOFFICE.REST.LIBREOFFICEREST.JSONVALID([.B3])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Bad JSON Test</text:p>
          </table:table-cell>
          <table:table-cell table:style-name="ce6" table:formula="of:=ORG.LIBREOFFICE.REST.LIBREOFFICEREST.JSONVALID(&quot;asd&quot;)" office:value-type="float" office:value="0" calcext:value-type="float">
            <text:p>0</text:p>
          </table:table-cell>
          <table:table-cell table:style-name="Default" table:number-columns-repeated="16382"/>
        </table:table-row>
        <table:table-row table:style-name="ro3">
          <table:table-cell table:style-name="ce3" office:value-type="string" calcext:value-type="string">
            <text:p>AddIn Info</text:p>
          </table:table-cell>
          <table:table-cell table:style-name="ce4" table:formula="of:=ORG.LIBREOFFICE.REST.LIBREOFFICEREST.RESTINFO()" office:value-type="string" office:string-value="LibreOfficeRest 0.1.0-SNAPSHOT; implementation=org.libreoffice.rest.LibreOfficeRestAddIn; service=org.libreoffice.rest.LibreOfficeRest; java=17.0.18+8-Ubuntu-124.04.1; debugLog=/tmp/libreoffice-rest.log; classLoader=com.sun.star.lib.unoloader.UnoClassLoader" calcext:value-type="string">
            <text:p>LibreOfficeRest 0.1.0-SNAPSHOT; implementation=org.libreoffice.rest.LibreOfficeRestAddIn; service=org.libreoffice.rest.LibreOfficeRest; java=17.0.18+8-Ubuntu-124.04.1; debugLog=/tmp/libreoffice-rest.log; classLoader=com.sun.star.lib.unoloader.UnoClassLoader</text:p>
          </table:table-cell>
          <table:table-cell table:style-name="Default" table:number-columns-repeated="16382"/>
        </table:table-row>
        <table:table-row table:style-name="ro1" table:number-rows-repeated="1048567">
          <table:table-cell table:number-columns-repeated="2"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5:21:12.120131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20:54:14.797421012</meta:creation-date>
    <dc:date>2026-05-17T15:22:57.279023376</dc:date>
    <meta:editing-duration>PT8H36M49S</meta:editing-duration>
    <meta:editing-cycles>18</meta:editing-cycles>
    <meta:generator>LibreOffice/26.2.3.2$Linux_X86_64 LibreOffice_project/70e089b17412e4cb7773e41413306b17a2328c34</meta:generator>
    <meta:document-statistic meta:table-count="1" meta:cell-count="13" meta:object-count="0"/>
  </office:meta>
</office:document-meta>
</file>