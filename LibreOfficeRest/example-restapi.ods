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JetBrains Mono Medium" svg:font-family="'JetBrains Mono Medium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9in"/>
    </style:style>
    <style:style style:name="co2" style:family="table-column">
      <style:table-column-properties fo:break-before="auto" style:column-width="2.6484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erif" style:font-name-asian="DejaVu Sans" style:font-name-complex="DejaVu Sans"/>
    </style:style>
    <style:style style:name="ce3" style:family="table-cell" style:parent-style-name="Default">
      <style:text-properties fo:color="#067d17" style:font-name="JetBrains Mono Medium" fo:font-size="9pt" fo:language="none" fo:country="none" style:font-name-asian="JetBrains Mono Medium" style:font-size-asian="9pt" style:language-asian="none" style:country-asian="none" style:font-name-complex="JetBrains Mono Medium" style:font-size-complex="9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tCall</text:p>
          </table:table-cell>
          <table:table-cell table:formula="of:=ORG.LIBREOFFICE.REST.LIBREOFFICEREST.HTTPGET(&quot;https://api.kraken.com/0/public/Ticker?pair=XBTEUR&quot;)" office:value-type="string" office:string-value="{&quot;error&quot;:[],&quot;result&quot;:{&quot;XXBTZEUR&quot;:{&quot;a&quot;:[&quot;68699.90000&quot;,&quot;3&quot;,&quot;3.000&quot;],&quot;b&quot;:[&quot;68699.80000&quot;,&quot;1&quot;,&quot;1.000&quot;],&quot;c&quot;:[&quot;68699.80000&quot;,&quot;0.00026223&quot;],&quot;v&quot;:[&quot;247.56194734&quot;,&quot;307.25025760&quot;],&quot;p&quot;:[&quot;68724.53454&quot;,&quot;68864.50206&quot;],&quot;t&quot;:[17707,21591],&quot;l&quot;:[&quot;68065.40000&quot;,&quot;68065.40000&quot;],&quot;h&quot;:[&quot;69424.50000&quot;,&quot;69687.80000&quot;],&quot;o&quot;:&quot;69388.40000&quot;}}}" calcext:value-type="string">
            <text:p>{"error":[],"result":{"XXBTZEUR":{"a":["68699.90000","3","3.000"],"b":["68699.80000","1","1.000"],"c":["68699.80000","0.00026223"],"v":["247.56194734","307.25025760"],"p":["68724.53454","68864.50206"],"t":[17707,21591],"l":["68065.40000","68065.40000"],"h":["69424.50000","69687.80000"],"o":"69388.40000"}}}</text:p>
          </table:table-cell>
          <table:table-cell/>
        </table:table-row>
        <table:table-row table:style-name="ro1">
          <table:table-cell office:value-type="string" calcext:value-type="string">
            <text:p>JSON Parsing Stock/Crypto Price</text:p>
          </table:table-cell>
          <table:table-cell table:formula="of:=ORG.LIBREOFFICE.REST.LIBREOFFICEREST.JSONNUMBER([.B3];&quot;$.result.XXBTZEUR.c[0]&quot;)" office:value-type="float" office:value="68699.8" calcext:value-type="float">
            <text:p>68699.8</text:p>
          </table:table-cell>
          <table:table-cell/>
        </table:table-row>
        <table:table-row table:style-name="ro1">
          <table:table-cell office:value-type="string" calcext:value-type="string">
            <text:p>AddIn Ping</text:p>
          </table:table-cell>
          <table:table-cell table:formula="of:=ORG.LIBREOFFICE.REST.LIBREOFFICEREST.PING()" office:value-type="string" office:string-value="LibreOfficeRest OK" calcext:value-type="string">
            <text:p>LibreOfficeRest OK</text:p>
          </table:table-cell>
          <table:table-cell/>
        </table:table-row>
        <table:table-row table:style-name="ro1">
          <table:table-cell office:value-type="string" calcext:value-type="string">
            <text:p>Good JSON Test</text:p>
          </table:table-cell>
          <table:table-cell table:style-name="ce2" table:formula="of:=ORG.LIBREOFFICE.REST.LIBREOFFICEREST.JSONVALID([.B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d JSON Test</text:p>
          </table:table-cell>
          <table:table-cell table:style-name="ce2" table:formula="of:=ORG.LIBREOFFICE.REST.LIBREOFFICEREST.JSONVALID(&quot;asd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JetBrains Mono Medium" svg:font-family="'JetBrains Mono Medium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8:13:16.261940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20:54:14.797421012</meta:creation-date>
    <dc:date>2026-05-12T18:43:26.093236876</dc:date>
    <meta:editing-duration>PT8H16M39S</meta:editing-duration>
    <meta:editing-cycles>14</meta:editing-cycles>
    <meta:generator>LibreOffice/26.2.3.2$Linux_X86_64 LibreOffice_project/70e089b17412e4cb7773e41413306b17a2328c34</meta:generator>
    <meta:document-statistic meta:table-count="1" meta:cell-count="11" meta:object-count="0"/>
  </office:meta>
</office:document-meta>
</file>